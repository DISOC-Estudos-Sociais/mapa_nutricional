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2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A utilização do pacote GEOCODEBR na localização do varejo alimentício em Fortaleza</text:span></text:span><text:line-break/><text:span text:style-name="Strong_20_Emphasis"><text:span text:style-name="T2">Nota técnica</text:span></text:span></text:p>
      <text:p text:style-name="P1"><text:span text:style-name="Strong_20_Emphasis">João Victor Batista Lopes</text:span><text:line-break/>Assessor técnico<text:line-break/>DISOC – IPECE</text:p>
      <text:p text:style-name="Text_20_body"/>
      <text:p text:style-name="P2">Com o objetivo de localizar espacialmente os estabelecimentos comerciais de varejo alimentício na cidade de Fortaleza, foi utilizado o recém-lançado pacote <text:span text:style-name="Source_20_Text">{geocodebr}</text:span>, desenvolvido por uma equipe do Instituto de Pesquisa Econômica Aplicada (Ipea), com apoio do Instituto Todos pela Saúde (ItpS).</text:p>
      <text:p text:style-name="P2">A principal fonte de dados utilizada pelo pacote é o Cadastro Nacional de Endereços para Fins Estatísticos (CNEFE), publicado pelo Instituto Brasileiro de Geografia e Estatística (IBGE). A grande vantagem de sua utilização reside na capacidade de geolocalizar dados de forma simples e eficiente, sem limite de consultas, em poucos minutos. Atualmente, o pacote está disponível apenas para a linguagem R.</text:p>
      <text:h text:style-name="P3" text:outline-level="2">Utilização</text:h>
      <text:p text:style-name="P2">O primeiro passo consistiu na obtenção dos dados de CNPJ dos estabelecimentos localizados em Fortaleza, por meio do download e tratamento da base disponibilizada no Portal de Dados Abertos do Governo Federal (Brasil, 2026). Foram aplicados filtros de município e de atividade econômica, de modo a selecionar exclusivamente o comércio varejista de alimentos no município.</text:p>
      <text:p text:style-name="P2">Para o funcionamento do pacote, são necessários os seguintes campos de endereço:</text:p>
      <text:list text:style-name="L1">
        <text:list-item>
          <text:p text:style-name="P4">logradouro</text:p>
        </text:list-item>
        <text:list-item>
          <text:p text:style-name="P4">número</text:p>
        </text:list-item>
        <text:list-item>
          <text:p text:style-name="P4">CEP</text:p>
        </text:list-item>
        <text:list-item>
          <text:p text:style-name="P4">localidade</text:p>
        </text:list-item>
        <text:list-item>
          <text:p text:style-name="P4">município</text:p>
        </text:list-item>
        <text:list-item>
          <text:p text:style-name="P4">estado</text:p>
        </text:list-item>
      </text:list>
      <text:p text:style-name="P2">Essas colunas foram informadas à função <text:span text:style-name="Source_20_Text">definir_campos()</text:span>, sendo posteriormente utilizada a função <text:span text:style-name="Source_20_Text">geocode()</text:span> para a obtenção das coordenadas geográficas dos endereços de entrada. O script abaixo ilustra o pipeline adotado:</text:p>
      <text:p text:style-name="P5"><text:span text:style-name="Source_20_Text">fortaleza |&gt;</text:span></text:p>
      <text:p text:style-name="P5"><text:span text:style-name="Source_20_Text"><text:s text:c="2"/>dplyr::filter(</text:span></text:p>
      <text:p text:style-name="P5"><text:span text:style-name="Source_20_Text"><text:s text:c="4"/>cnae_fiscal_principal %in% c(</text:span></text:p>
      <text:p text:style-name="P5"><text:span text:style-name="Source_20_Text"><text:s text:c="6"/>"4711302", "4711301", "4721104", "4722901", "4712100",</text:span></text:p>
      <text:p text:style-name="P5"><text:span text:style-name="Source_20_Text"><text:s text:c="6"/>"4729699", "4771701", "4771702", "4721103", "4723700",</text:span></text:p>
      <text:p text:style-name="P5"><text:span text:style-name="Source_20_Text"><text:s text:c="6"/>"4724500", "4729602", "4771703"</text:span></text:p>
      <text:p text:style-name="P5"><text:soft-page-break/><text:span text:style-name="Source_20_Text"><text:s text:c="4"/>),</text:span></text:p>
      <text:p text:style-name="P5"><text:span text:style-name="Source_20_Text"><text:s text:c="4"/>sort = TRUE</text:span></text:p>
      <text:p text:style-name="P5"><text:span text:style-name="Source_20_Text"><text:s text:c="2"/>) |&gt;</text:span></text:p>
      <text:p text:style-name="P5"><text:span text:style-name="Source_20_Text"><text:s text:c="2"/>dplyr::mutate(</text:span></text:p>
      <text:p text:style-name="P5"><text:span text:style-name="Source_20_Text"><text:s text:c="4"/>logradouro = stringr::str_c(tipo_logradouro, " ", logradouro),</text:span></text:p>
      <text:p text:style-name="P5"><text:span text:style-name="Source_20_Text"><text:s text:c="4"/>municipio = "Fortaleza"</text:span></text:p>
      <text:p text:style-name="P5"><text:span text:style-name="Source_20_Text"><text:s text:c="2"/>) |&gt;</text:span></text:p>
      <text:p text:style-name="P5"><text:span text:style-name="Source_20_Text"><text:s text:c="2"/>geocodebr::geocode(</text:span></text:p>
      <text:p text:style-name="P5"><text:span text:style-name="Source_20_Text"><text:s text:c="4"/>campos_endereco = geocodebr::definir_campos(</text:span></text:p>
      <text:p text:style-name="P5"><text:span text:style-name="Source_20_Text"><text:s text:c="6"/>estado = "uf",</text:span></text:p>
      <text:p text:style-name="P5"><text:span text:style-name="Source_20_Text"><text:s text:c="6"/>municipio = "municipio",</text:span></text:p>
      <text:p text:style-name="P5"><text:span text:style-name="Source_20_Text"><text:s text:c="6"/>cep = "cep",</text:span></text:p>
      <text:p text:style-name="P5"><text:span text:style-name="Source_20_Text"><text:s text:c="6"/>logradouro = "logradouro",</text:span></text:p>
      <text:p text:style-name="P5"><text:span text:style-name="Source_20_Text"><text:s text:c="6"/>localidade = "bairro",</text:span></text:p>
      <text:p text:style-name="P5"><text:span text:style-name="Source_20_Text"><text:s text:c="6"/>numero = "numero"</text:span></text:p>
      <text:p text:style-name="P5"><text:span text:style-name="Source_20_Text"><text:s text:c="4"/>),</text:span></text:p>
      <text:p text:style-name="P5"><text:span text:style-name="Source_20_Text"><text:s text:c="4"/>resultado_completo = TRUE,</text:span></text:p>
      <text:p text:style-name="P5"><text:span text:style-name="Source_20_Text"><text:s text:c="4"/>padronizar_enderecos = TRUE</text:span></text:p>
      <text:p text:style-name="P5"><text:span text:style-name="Source_20_Text"><text:s text:c="2"/>)</text:span></text:p>
      <text:p text:style-name="P2">Os resultados produzidos pelo <text:span text:style-name="Source_20_Text">{geocodebr}</text:span> são classificados em seis categorias gerais de precisão, de acordo com o nível de exatidão com que cada endereço de entrada é identificado nos dados do CNEFE. Além disso, o pacote fornece uma estimativa da incerteza da localização obtida, expressa como um desvio em metros. As categorias são:</text:p>
      <text:list text:style-name="L2">
        <text:list-item>
          <text:p text:style-name="P6"><text:span text:style-name="Strong_20_Emphasis">“numero”</text:span> – coordenadas calculadas a partir de endereços que compartilham o mesmo logradouro e número;</text:p>
        </text:list-item>
        <text:list-item>
          <text:p text:style-name="P6"><text:span text:style-name="Strong_20_Emphasis">“numero_aproximado”</text:span> – coordenadas calculadas a partir de endereços que compartilham o mesmo logradouro, quando o número informado não possui correspondência exata no CNEFE, sendo a localização estimada por interpolação espacial;</text:p>
        </text:list-item>
        <text:list-item>
          <text:p text:style-name="P6"><text:span text:style-name="Strong_20_Emphasis">“logradouro”</text:span> – coordenadas calculadas a partir de endereços que compartilham o mesmo logradouro, nos casos em que o número está ausente ou é informado como S/N;</text:p>
        </text:list-item>
        <text:list-item>
          <text:p text:style-name="P6"><text:span text:style-name="Strong_20_Emphasis">“cep”</text:span> – coordenadas calculadas a partir de endereços que compartilham o mesmo CEP;</text:p>
        </text:list-item>
        <text:list-item>
          <text:p text:style-name="P6"><text:span text:style-name="Strong_20_Emphasis">“localidade”</text:span> – coordenadas calculadas a partir de endereços que compartilham a mesma localidade;</text:p>
        </text:list-item>
        <text:list-item>
          <text:p text:style-name="P6"><text:span text:style-name="Strong_20_Emphasis">“municipio”</text:span> – coordenadas calculadas a partir de endereços que compartilham o mesmo município.</text:p>
        </text:list-item>
      </text:list>
      <text:h text:style-name="P3" text:outline-level="2"><text:soft-page-break/>Referências</text:h>
      <text:p text:style-name="Text_20_body">BRASIL. Portal de Dados Abertos. 2026. Disponível em: <text:a xlink:type="simple" xlink:href="https://dados.gov.br/dados/conjuntos-dados/cadastro-nacional-da-pessoa-juridica---cnpj" text:style-name="Internet_20_link" text:visited-style-name="Visited_20_Internet_20_Link">https://dados.gov.br/dados/conjuntos-dados/cadastro-nacional-da-pessoa-juridica---cnpj</text:a>. Acesso em: 26 fev. 2026.</text:p>
      <text:p text:style-name="Text_20_body">PEREIRA, R. H. M.; HERSZENHUT, D. 2025. <text:span text:style-name="Emphasis">geocodebr: Geolocalização de Endereços Brasileiros</text:span>. Disponível em: <text:a xlink:type="simple" xlink:href="https://ipeagit.github.io/geocodebr/" text:style-name="Internet_20_link" text:visited-style-name="Visited_20_Internet_20_Link">https://ipeagit.github.io/geocodebr/</text:a>. Acesso em: 26 fev. 2026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text-align="justify" style:justify-single-word="false" fo:text-indent="0cm" style:auto-text-indent="false" style:page-number="au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fo:font-size="12pt" fo:font-weight="normal" style:font-size-asian="10.5pt" style:font-weight-asian="normal" style:font-size-complex="12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13:26:12.252584500</meta:creation-date>
    <meta:generator>LibreOffice/25.2.7.2$Windows_X86_64 LibreOffice_project/5cbfd1ab6520636bb5f7b99185aa69bd7456825d</meta:generator>
    <dc:date>2026-02-26T14:45:11.576651200</dc:date>
    <meta:editing-duration>PT2M48S</meta:editing-duration>
    <meta:editing-cycles>1</meta:editing-cycles>
    <meta:document-statistic meta:table-count="0" meta:image-count="0" meta:object-count="0" meta:page-count="3" meta:paragraph-count="49" meta:word-count="500" meta:character-count="3684" meta:non-whitespace-character-count="3137"/>
  </office:meta>
</office:document-meta>
</file>